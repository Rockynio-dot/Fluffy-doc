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lbl" style:family="paragraph">
      <style:text-properties fo:font-weight="bold"/>
    </style:style>
    <style:style style:name="cell" style:family="table-cell">
      <style:table-cell-properties fo:border="0.5pt solid #000000" fo:padding="0.1cm"/>
    </style:style>
  </office:automatic-styles>
  <office:body>
    <office:text>
      <text:h text:outline-level="1">Předávací protokol – PC / Notebook</text:h>
      <text:p>Předání počítače nebo notebooku zaměstnanci.</text:p>
      <text:p/>
      <table:table table:name="pole">
        <table:table-column table:number-columns-repeated="2"/>
        <table:table-row>
          <table:table-cell table:style-name="cell">
            <text:p text:style-name="lbl">Číslo protokolu</text:p>
          </table:table-cell>
          <table:table-cell table:style-name="cell">
            <text:p>{{cislo_protokolu}}</text:p>
          </table:table-cell>
        </table:table-row>
        <table:table-row>
          <table:table-cell table:style-name="cell">
            <text:p text:style-name="lbl">Datum předání *</text:p>
          </table:table-cell>
          <table:table-cell table:style-name="cell">
            <text:p>{{datum_predani}}</text:p>
          </table:table-cell>
        </table:table-row>
        <table:table-row>
          <table:table-cell table:style-name="cell">
            <text:p text:style-name="lbl">Předávající *</text:p>
          </table:table-cell>
          <table:table-cell table:style-name="cell">
            <text:p>{{predavajici}}</text:p>
          </table:table-cell>
        </table:table-row>
        <table:table-row>
          <table:table-cell table:style-name="cell">
            <text:p text:style-name="lbl">Přebírající *</text:p>
          </table:table-cell>
          <table:table-cell table:style-name="cell">
            <text:p>{{prebirajici}}</text:p>
          </table:table-cell>
        </table:table-row>
        <table:table-row>
          <table:table-cell table:style-name="cell">
            <text:p text:style-name="lbl">Středisko / oddělení</text:p>
          </table:table-cell>
          <table:table-cell table:style-name="cell">
            <text:p>{{stredisko}}</text:p>
          </table:table-cell>
        </table:table-row>
        <table:table-row>
          <table:table-cell table:style-name="cell">
            <text:p text:style-name="lbl">Typ zařízení</text:p>
          </table:table-cell>
          <table:table-cell table:style-name="cell">
            <text:p>{{typ_zarizeni}}</text:p>
          </table:table-cell>
        </table:table-row>
        <table:table-row>
          <table:table-cell table:style-name="cell">
            <text:p text:style-name="lbl">Výrobce</text:p>
          </table:table-cell>
          <table:table-cell table:style-name="cell">
            <text:p>{{vyrobce}}</text:p>
          </table:table-cell>
        </table:table-row>
        <table:table-row>
          <table:table-cell table:style-name="cell">
            <text:p text:style-name="lbl">Model</text:p>
          </table:table-cell>
          <table:table-cell table:style-name="cell">
            <text:p>{{model}}</text:p>
          </table:table-cell>
        </table:table-row>
        <table:table-row>
          <table:table-cell table:style-name="cell">
            <text:p text:style-name="lbl">Sériové číslo (S/N) *</text:p>
          </table:table-cell>
          <table:table-cell table:style-name="cell">
            <text:p>{{seriove_cislo}}</text:p>
          </table:table-cell>
        </table:table-row>
        <table:table-row>
          <table:table-cell table:style-name="cell">
            <text:p text:style-name="lbl">Inventární číslo</text:p>
          </table:table-cell>
          <table:table-cell table:style-name="cell">
            <text:p>{{inventarni_cislo}}</text:p>
          </table:table-cell>
        </table:table-row>
        <table:table-row>
          <table:table-cell table:style-name="cell">
            <text:p text:style-name="lbl">MAC adresa</text:p>
          </table:table-cell>
          <table:table-cell table:style-name="cell">
            <text:p>{{mac_adresa}}</text:p>
          </table:table-cell>
        </table:table-row>
        <table:table-row>
          <table:table-cell table:style-name="cell">
            <text:p text:style-name="lbl">Operační systém</text:p>
          </table:table-cell>
          <table:table-cell table:style-name="cell">
            <text:p>{{operacni_system}}</text:p>
          </table:table-cell>
        </table:table-row>
        <table:table-row>
          <table:table-cell table:style-name="cell">
            <text:p text:style-name="lbl">Příslušenství</text:p>
          </table:table-cell>
          <table:table-cell table:style-name="cell">
            <text:p>{{prislusenstvi}}</text:p>
          </table:table-cell>
        </table:table-row>
        <table:table-row>
          <table:table-cell table:style-name="cell">
            <text:p text:style-name="lbl">Poznámka</text:p>
          </table:table-cell>
          <table:table-cell table:style-name="cell">
            <text:p>{{poznamka}}</text:p>
          </table:table-cell>
        </table:table-row>
      </table:table>
      <text:p/>
      <text:p>Přebírající svým podpisem potvrzuje převzetí výše uvedeného majetku v pořádku.</text:p>
      <text:p/>
      <text:p>Předávající: {{predavajici}}</text:p>
      <text:p>Přebírající: {{prebirajici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/>
</office:document-styles>
</file>